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6000001EFB6057D08.png" manifest:media-type="image/png"/>
  <manifest:file-entry manifest:full-path="Pictures/100000010000035D000000DBAB76119A.png" manifest:media-type="image/png"/>
  <manifest:file-entry manifest:full-path="Pictures/100000010000034F0000017A4420970D.png" manifest:media-type="image/png"/>
  <manifest:file-entry manifest:full-path="Pictures/100000010000011D0000013D7BF4BE8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-Mono" svg:font-family="Liberation-Mono"/>
    <style:font-face style:name="Liberation-Serif" svg:font-family="Liberation-Serif"/>
    <style:font-face style:name="LiberationSerif" svg:font-family="LiberationSerif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cccccc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42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solid" draw:fill-color="#f4f4f4" loext:decorative="false"/>
    </style:style>
    <style:style style:name="gr10" style:family="graphic" style:parent-style-name="standard">
      <style:graphic-properties draw:stroke="none" draw:fill="solid" draw:fill-color="#fafafa" loext:decorative="false"/>
    </style:style>
    <style:style style:name="gr11" style:family="graphic" style:parent-style-name="standard">
      <style:graphic-properties draw:stroke="none" draw:fill="solid" draw:fill-color="#666666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046cm" fo:min-width="19.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ccccc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4f4f4"/>
    </style:style>
    <style:style style:name="P11" style:family="paragraph">
      <loext:graphic-properties draw:fill="solid" draw:fill-color="#fafafa"/>
    </style:style>
    <style:style style:name="P12" style:family="paragraph">
      <loext:graphic-properties draw:fill="solid" draw:fill-color="#666666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000000" loext:opacity="100%" style:font-name="LiberationSerif" fo:font-size="20pt" fo:font-weight="bold" style:font-name-asian="LiberationSerif" style:font-size-asian="20pt" style:font-weight-asian="bold" style:font-name-complex="LiberationSerif" style:font-size-complex="20pt" style:font-weight-complex="bold"/>
    </style:style>
    <style:style style:name="T2" style:family="text">
      <style:text-properties fo:color="#000000" loext:opacity="100%" style:font-name="Liberation-Serif" fo:font-size="12pt" fo:font-weight="normal" style:font-name-asian="Liberation-Serif" style:font-size-asian="12pt" style:font-weight-asian="normal" style:font-name-complex="Liberation-Serif" style:font-size-complex="12pt" style:font-weight-complex="normal"/>
    </style:style>
    <style:style style:name="T3" style:family="text">
      <style:text-properties fo:color="#000000" loext:opacity="100%" style:font-name="LiberationSerif" fo:font-size="12pt" fo:font-weight="bold" style:font-name-asian="LiberationSerif" style:font-size-asian="12pt" style:font-weight-asian="bold" style:font-name-complex="LiberationSerif" style:font-size-complex="12pt" style:font-weight-complex="bold"/>
    </style:style>
    <style:style style:name="T4" style:family="text">
      <style:text-properties fo:color="#000000" loext:opacity="100%" style:font-name="LiberationSerif" fo:font-size="16pt" fo:font-weight="bold" style:font-name-asian="LiberationSerif" style:font-size-asian="16pt" style:font-weight-asian="bold" style:font-name-complex="LiberationSerif" style:font-size-complex="16pt" style:font-weight-complex="bold"/>
    </style:style>
    <style:style style:name="T5" style:family="text">
      <style:text-properties fo:color="#000000" loext:opacity="100%" style:font-name="Liberation-Mono" fo:font-size="10pt" fo:font-weight="normal" style:font-name-asian="Liberation-Mono" style:font-size-asian="10pt" style:font-weight-asian="normal" style:font-name-complex="Liberation-Mono" style:font-size-complex="10pt" style:font-weight-complex="normal"/>
    </style:style>
    <style:style style:name="T6" style:family="text">
      <style:text-properties fo:color="#000000" loext:opacity="100%" style:font-name="Liberation-Serif" fo:font-size="10pt" fo:font-weight="normal" style:font-name-asian="Liberation-Serif" style:font-size-asian="10pt" style:font-weight-asian="normal" style:font-name-complex="Liberation-Serif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699cm" svg:x="11.702cm" svg:y="0.78cm" svg:viewBox="0 0 21000 29700" draw:points="0,0 21000,0 21000,29700 0,29700">
          <text:p/>
        </draw:polygon>
        <draw:polygon draw:style-name="gr2" draw:text-style-name="P2" draw:layer="layout" svg:width="18cm" svg:height="0.053cm" svg:x="1.499cm" svg:y="5.362cm" svg:viewBox="0 0 18001 54" draw:points="18001,54 0,54 0,0 18001,0">
          <text:p/>
        </draw:polygon>
        <draw:polygon draw:style-name="gr3" draw:text-style-name="P3" draw:layer="layout" svg:width="18cm" svg:height="0.027cm" svg:x="1.499cm" svg:y="9.119cm" svg:viewBox="0 0 18001 28" draw:points="18001,28 0,28 0,0 18001,0">
          <text:p/>
        </draw:polygon>
        <draw:polygon draw:style-name="gr3" draw:text-style-name="P3" draw:layer="layout" svg:width="18cm" svg:height="0.026cm" svg:x="1.499cm" svg:y="14.298cm" svg:viewBox="0 0 18001 27" draw:points="18001,27 0,27 0,0 18001,0">
          <text:p/>
        </draw:polygon>
        <draw:polygon draw:style-name="gr1" draw:text-style-name="P1" draw:layer="layout" svg:width="18cm" svg:height="9.366cm" svg:x="1.499cm" svg:y="16.592cm" svg:viewBox="0 0 18001 9367" draw:points="0,0 18001,0 18001,9367 0,9367">
          <text:p/>
        </draw:polygon>
        <draw:path draw:style-name="gr2" draw:text-style-name="P2" draw:layer="layout" svg:width="18cm" svg:height="9.366cm" svg:x="1.499cm" svg:y="16.592cm" svg:viewBox="0 0 18001 9367" svg:d="M53 53h17896v9261h-17896zM0 0h18001v9367h-18001z">
          <text:p/>
        </draw:path>
        <draw:frame draw:style-name="gr4" draw:text-style-name="P5" draw:layer="layout" svg:width="17.521cm" svg:height="0.784cm" svg:x="1.855cm" svg:y="1.639cm">
          <draw:text-box>
            <text:p text:style-name="P4"><text:span text:style-name="T1">PROJECT REPORT: ONLINE SHOPPING DATABASE</text:span></text:p>
          </draw:text-box>
        </draw:frame>
        <draw:frame draw:style-name="gr4" draw:text-style-name="P5" draw:layer="layout" svg:width="2.909cm" svg:height="0.784cm" svg:x="9.049cm" svg:y="2.697cm">
          <draw:text-box>
            <text:p text:style-name="P4"><text:span text:style-name="T1">SYSTEM</text:span></text:p>
          </draw:text-box>
        </draw:frame>
        <draw:frame draw:style-name="gr5" draw:text-style-name="P6" draw:layer="layout" svg:width="10.076cm" svg:height="0.471cm" svg:x="5.489cm" svg:y="4.123cm">
          <draw:text-box>
            <text:p text:style-name="P4"><text:span text:style-name="T2">Technical Architecture, ERD, and Security Implementation</text:span></text:p>
          </draw:text-box>
        </draw:frame>
        <draw:frame draw:style-name="gr5" draw:text-style-name="P6" draw:layer="layout" svg:width="6.658cm" svg:height="0.471cm" svg:x="1.5cm" svg:y="6.293cm">
          <draw:text-box>
            <text:p text:style-name="P4"><text:span text:style-name="T3">NAME: AINOMUGISHA RONALD</text:span></text:p>
          </draw:text-box>
        </draw:frame>
        <draw:frame draw:style-name="gr5" draw:text-style-name="P6" draw:layer="layout" svg:width="12.28cm" svg:height="1.881cm" svg:x="1.5cm" svg:y="6.928cm">
          <draw:text-box>
            <text:p text:style-name="P4"><text:span text:style-name="T3">REG NO: 2025/BCS/021/PS</text:span></text:p>
            <text:p text:style-name="P4"><text:span text:style-name="T3">PROJECT NAME: ONLINE SHOPPING</text:span></text:p>
            <text:p text:style-name="P4"><text:span text:style-name="T3">BUSINESS CASE: E-COMMERCE</text:span></text:p>
            <text:p text:style-name="P4"><text:span text:style-name="T3">INDIVIDUAL PROJECT: SECURITY AND ACCESS CONTROL </text:span></text:p>
          </draw:text-box>
        </draw:frame>
        <draw:frame draw:style-name="gr6" draw:text-style-name="P7" draw:layer="layout" svg:width="5.428cm" svg:height="0.635cm" svg:x="1.557cm" svg:y="9.207cm">
          <draw:text-box>
            <text:p text:style-name="P4"><text:span text:style-name="T4">1. Executive Summary</text:span></text:p>
          </draw:text-box>
        </draw:frame>
        <draw:frame draw:style-name="gr5" draw:text-style-name="P6" draw:layer="layout" svg:width="16.614cm" svg:height="0.471cm" svg:x="1.5cm" svg:y="9.698cm">
          <draw:text-box>
            <text:p text:style-name="P4"><text:span text:style-name="T2">This project involved the design and development of an Online Shopping Database. The system is</text:span></text:p>
          </draw:text-box>
        </draw:frame>
        <draw:frame draw:style-name="gr5" draw:text-style-name="P6" draw:layer="layout" svg:width="15.577cm" svg:height="0.471cm" svg:x="1.5cm" svg:y="10.333cm">
          <draw:text-box>
            <text:p text:style-name="P4"><text:span text:style-name="T2">designed to manage a full e-commerce lifecycle including inventory management, customer</text:span></text:p>
          </draw:text-box>
        </draw:frame>
        <draw:frame draw:style-name="gr5" draw:text-style-name="P6" draw:layer="layout" svg:width="16.755cm" svg:height="0.471cm" svg:x="1.5cm" svg:y="10.968cm">
          <draw:text-box>
            <text:p text:style-name="P4"><text:span text:style-name="T2">authentication, and order fulfillment. My specialized contribution focused on </text:span><text:span text:style-name="T3">Security and Access</text:span></text:p>
          </draw:text-box>
        </draw:frame>
        <draw:frame draw:style-name="gr5" draw:text-style-name="P6" draw:layer="layout" svg:width="17.601cm" svg:height="0.471cm" svg:x="1.5cm" svg:y="11.603cm">
          <draw:text-box>
            <text:p text:style-name="P4"><text:span text:style-name="T3">Control</text:span><text:span text:style-name="T2">, ensuring data privacy via cryptographic hashing and protecting system integrity through Role-</text:span></text:p>
          </draw:text-box>
        </draw:frame>
        <draw:frame draw:style-name="gr5" draw:text-style-name="P6" draw:layer="layout" svg:width="5.387cm" svg:height="0.471cm" svg:x="1.5cm" svg:y="12.238cm">
          <draw:text-box>
            <text:p text:style-name="P4"><text:span text:style-name="T2">Based Access Control (RBAC).</text:span></text:p>
          </draw:text-box>
        </draw:frame>
        <draw:frame draw:style-name="gr7" draw:text-style-name="P8" draw:layer="layout" svg:width="9.214cm" svg:height="0.628cm" svg:x="1.5cm" svg:y="13.562cm">
          <draw:text-box>
            <text:p text:style-name="P4"><text:span text:style-name="T4">2. Entity Relationship Diagram (ERD)</text:span></text:p>
          </draw:text-box>
        </draw:frame>
        <draw:frame draw:style-name="gr5" draw:text-style-name="P6" draw:layer="layout" svg:width="16.578cm" svg:height="0.471cm" svg:x="1.5cm" svg:y="14.876cm">
          <draw:text-box>
            <text:p text:style-name="P4"><text:span text:style-name="T2">The diagram below represents the logical blueprint of the OnlineShopping database. It defines the</text:span></text:p>
          </draw:text-box>
        </draw:frame>
        <draw:frame draw:style-name="gr5" draw:text-style-name="P6" draw:layer="layout" svg:width="14.755cm" svg:height="0.471cm" svg:x="1.5cm" svg:y="15.511cm">
          <draw:text-box>
            <text:p text:style-name="P4"><text:span text:style-name="T2">constraints and relationships required to ensure data consistency across the application.</text:span></text:p>
          </draw:text-box>
        </draw:frame>
        <draw:frame draw:style-name="gr8" draw:text-style-name="P9" draw:layer="layout" svg:width="20.999cm" svg:height="9.37cm" svg:x="0.03cm" svg:y="12.672cm">
          <draw:image xlink:href="Pictures/100000010000034F0000017A4420970D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0.999cm" svg:height="29.699cm" svg:x="0cm" svg:y="0cm" svg:viewBox="0 0 21000 29700" draw:points="0,0 21000,0 21000,29700 0,29700">
          <text:p/>
        </draw:polygon>
        <draw:polygon draw:style-name="gr3" draw:text-style-name="P3" draw:layer="layout" svg:width="18cm" svg:height="0.027cm" svg:x="1.499cm" svg:y="2.346cm" svg:viewBox="0 0 18001 28" draw:points="18001,28 0,28 0,0 18001,0">
          <text:p/>
        </draw:polygon>
        <draw:polygon draw:style-name="gr9" draw:text-style-name="P10" draw:layer="layout" svg:width="18cm" svg:height="3.228cm" svg:x="1.499cm" svg:y="4.534cm" svg:viewBox="0 0 18001 3229" draw:points="0,0 18001,0 18001,3229 0,3229">
          <text:p/>
        </draw:polygon>
        <draw:path draw:style-name="gr2" draw:text-style-name="P2" draw:layer="layout" svg:width="18cm" svg:height="3.228cm" svg:x="1.499cm" svg:y="4.534cm" svg:viewBox="0 0 18001 3229" svg:d="M27 27h17948v3176h-17948zM0 0h18001v3229h-18001z">
          <text:p/>
        </draw:path>
        <draw:polygon draw:style-name="gr10" draw:text-style-name="P11" draw:layer="layout" svg:width="18cm" svg:height="4.815cm" draw:transform="skewX (-0.00453785605518526) rotate (0.000698131700797732) translate (1.499cm 8.027cm)" svg:viewBox="0 0 18001 4816" draw:points="0,0 18001,0 18001,4816 0,4816">
          <text:p/>
        </draw:polygon>
        <draw:path draw:style-name="gr11" draw:text-style-name="P12" draw:layer="layout" svg:width="18cm" svg:height="0.026cm" svg:x="1.499cm" svg:y="12.816cm" svg:viewBox="0 0 18001 27" svg:d="M80 0v27h-80l27-27zM159 0h79v27h-79zM318 0h79v27h-79zM476 0h80v27h-80zM635 0h79v27h-79zM793 0h80v27h-80zM952 0h79v27h-79zM1111 0h79v27h-79zM1269 0h80v27h-80zM1428 0h79v27h-79zM1586 0h80v27h-80zM1745 0h79v27h-79zM1904 0h79v27h-79zM2062 0h79v27h-79zM2221 0h79v27h-79zM2379 0h80v27h-80zM2538 0h79v27h-79zM2697 0h79v27h-79zM2855 0h79v27h-79zM3014 0h79v27h-79zM3172 0h80v27h-80zM3331 0h79v27h-79zM3489 0h80v27h-80zM3648 0h79v27h-79zM3807 0h79v27h-79zM3965 0h80v27h-80zM4124 0h79v27h-79zM4282 0h80v27h-80zM4441 0h79v27h-79zM4600 0h79v27h-79zM4758 0h80v27h-80zM4917 0h79v27h-79zM5075 0h80v27h-80zM5234 0h79v27h-79zM5393 0h79v27h-79zM5551 0h79v27h-79zM5710 0h79v27h-79zM5868 0h80v27h-80zM6027 0h79v27h-79zM6186 0h79v27h-79zM6344 0h79v27h-79zM6503 0h79v27h-79zM6661 0h80v27h-80zM6820 0h79v27h-79zM6978 0h80v27h-80zM7137 0h79v27h-79zM7296 0h79v27h-79zM7454 0h81v27h-81zM7614 0h79v27h-79zM7772 0h80v27h-80zM7931 0h79v27h-79zM8090 0h79v27h-79zM8248 0h79v27h-79zM8407 0h79v27h-79zM8565 0h80v27h-80zM8724 0h79v27h-79zM8883 0h79v27h-79zM9041 0h79v27h-79zM9200 0h79v27h-79zM9358 0h80v27h-80zM9517 0h79v27h-79zM9676 0h79v27h-79zM9834 0h79v27h-79zM9993 0h79v27h-79zM10151 0h80v27h-80zM10310 0h79v27h-79zM10468 0h80v27h-80zM10627 0h79v27h-79zM10786 0h79v27h-79zM10944 0h80v27h-80zM11103 0h79v27h-79zM11261 0h80v27h-80zM11420 0h79v27h-79zM11579 0h79v27h-79zM11737 0h79v27h-79zM11896 0h79v27h-79zM12054 0h80v27h-80zM12213 0h79v27h-79zM12372 0h79v27h-79zM12530 0h79v27h-79zM12689 0h79v27h-79zM12847 0h80v27h-80zM13006 0h79v27h-79zM13164 0h80v27h-80zM13323 0h79v27h-79zM13482 0h79v27h-79zM13640 0h80v27h-80zM13799 0h79v27h-79zM13957 0h80v27h-80zM14116 0h79v27h-79zM14275 0h79v27h-79zM14433 0h80v27h-80zM14592 0h79v27h-79zM14750 0h80v27h-80zM14909 0h79v27h-79zM15068 0h79v27h-79zM15226 0h79v27h-79zM15385 0h79v27h-79zM15543 0h80v27h-80zM15702 0h79v27h-79zM15861 0h79v27h-79zM16019 0h79v27h-79zM16178 0h79v27h-79zM16336 0h80v27h-80zM16495 0h79v27h-79zM16653 0h80v27h-80zM16812 0h79v27h-79zM16971 0h79v27h-79zM17129 0h80v27h-80zM17288 0h79v27h-79zM17446 0h80v27h-80zM17605 0h79v27h-79zM17764 0h79v27h-79zM17922 0h53l26 27h-79z">
          <text:p/>
        </draw:path>
        <draw:path draw:style-name="gr11" draw:text-style-name="P12" draw:layer="layout" svg:width="0.027cm" svg:height="4.815cm" svg:x="1.499cm" svg:y="8.027cm" svg:viewBox="0 0 28 4816" svg:d="M28 79h-28v-79l28 26zM0 158h28v79h-28zM0 316h28v79h-28zM0 474h28v79h-28zM0 631h28v79h-28zM0 789h28v79h-28zM0 947h28v79h-28zM0 1105h28v79h-28zM0 1263h28v79h-28zM0 1421h28v79h-28zM0 1579h28v79h-28zM0 1737h28v79h-28zM0 1895h28v78h-28zM0 2052h28v79h-28zM0 2210h28v79h-28zM0 2368h28v79h-28zM0 2526h28v79h-28zM0 2684h28v79h-28zM0 2842h28v79h-28zM0 3000h28v79h-28zM0 3158h28v79h-28zM0 3315h28v79h-28zM0 3473h28v79h-28zM0 3631h28v79h-28zM0 3789h28v79h-28zM0 3947h28v80h-28zM0 4106h28v79h-28zM0 4264h28v79h-28zM0 4422h28v79h-28zM0 4580h28v78h-28zM0 4737h28v53l-28 26z">
          <text:p/>
        </draw:path>
        <draw:path draw:style-name="gr11" draw:text-style-name="P12" draw:layer="layout" svg:width="0.026cm" svg:height="4.815cm" svg:x="19.473cm" svg:y="8.027cm" svg:viewBox="0 0 27 4816" svg:d="M27 79h-27v-53l27-26zM0 158h27v79h-27zM0 316h27v79h-27zM0 474h27v79h-27zM0 631h27v79h-27zM0 789h27v79h-27zM0 947h27v79h-27zM0 1105h27v79h-27zM0 1263h27v79h-27zM0 1421h27v79h-27zM0 1579h27v79h-27zM0 1737h27v79h-27zM0 1895h27v78h-27zM0 2052h27v79h-27zM0 2210h27v79h-27zM0 2368h27v79h-27zM0 2526h27v79h-27zM0 2684h27v79h-27zM0 2842h27v79h-27zM0 3000h27v79h-27zM0 3158h27v79h-27zM0 3315h27v79h-27zM0 3473h27v79h-27zM0 3631h27v79h-27zM0 3789h27v79h-27zM0 3947h27v80h-27zM0 4106h27v79h-27zM0 4264h27v79h-27zM0 4422h27v79h-27zM0 4580h27v78h-27zM0 4737h27v79l-27-26z">
          <text:p/>
        </draw:path>
        <draw:path draw:style-name="gr11" draw:text-style-name="P12" draw:layer="layout" svg:width="18cm" svg:height="0.026cm" svg:x="1.499cm" svg:y="8.027cm" svg:viewBox="0 0 18001 27" svg:d="M80 0v27h-53l-27-27zM159 0h79v27h-79zM318 0h79v27h-79zM476 0h80v27h-80zM635 0h79v27h-79zM793 0h80v27h-80zM952 0h79v27h-79zM1111 0h79v27h-79zM1269 0h80v27h-80zM1428 0h79v27h-79zM1586 0h80v27h-80zM1745 0h79v27h-79zM1904 0h79v27h-79zM2062 0h79v27h-79zM2221 0h79v27h-79zM2379 0h80v27h-80zM2538 0h79v27h-79zM2697 0h79v27h-79zM2855 0h79v27h-79zM3014 0h79v27h-79zM3172 0h80v27h-80zM3331 0h79v27h-79zM3489 0h80v27h-80zM3648 0h79v27h-79zM3807 0h79v27h-79zM3965 0h80v27h-80zM4124 0h79v27h-79zM4282 0h80v27h-80zM4441 0h79v27h-79zM4600 0h79v27h-79zM4758 0h80v27h-80zM4917 0h79v27h-79zM5075 0h80v27h-80zM5234 0h79v27h-79zM5393 0h79v27h-79zM5551 0h79v27h-79zM5710 0h79v27h-79zM5868 0h80v27h-80zM6027 0h79v27h-79zM6186 0h79v27h-79zM6344 0h79v27h-79zM6503 0h79v27h-79zM6661 0h80v27h-80zM6820 0h79v27h-79zM6978 0h80v27h-80zM7137 0h79v27h-79zM7296 0h79v27h-79zM7454 0h81v27h-81zM7614 0h79v27h-79zM7772 0h80v27h-80zM7931 0h79v27h-79zM8090 0h79v27h-79zM8248 0h79v27h-79zM8407 0h79v27h-79zM8565 0h80v27h-80zM8724 0h79v27h-79zM8883 0h79v27h-79zM9041 0h79v27h-79zM9200 0h79v27h-79zM9358 0h80v27h-80zM9517 0h79v27h-79zM9676 0h79v27h-79zM9834 0h79v27h-79zM9993 0h79v27h-79zM10151 0h80v27h-80zM10310 0h79v27h-79zM10468 0h80v27h-80zM10627 0h79v27h-79zM10786 0h79v27h-79zM10944 0h80v27h-80zM11103 0h79v27h-79zM11261 0h80v27h-80zM11420 0h79v27h-79zM11579 0h79v27h-79zM11737 0h79v27h-79zM11896 0h79v27h-79zM12054 0h80v27h-80zM12213 0h79v27h-79zM12372 0h79v27h-79zM12530 0h79v27h-79zM12689 0h79v27h-79zM12847 0h80v27h-80zM13006 0h79v27h-79zM13164 0h80v27h-80zM13323 0h79v27h-79zM13482 0h79v27h-79zM13640 0h80v27h-80zM13799 0h79v27h-79zM13957 0h80v27h-80zM14116 0h79v27h-79zM14275 0h79v27h-79zM14433 0h80v27h-80zM14592 0h79v27h-79zM14750 0h80v27h-80zM14909 0h79v27h-79zM15068 0h79v27h-79zM15226 0h79v27h-79zM15385 0h79v27h-79zM15543 0h80v27h-80zM15702 0h79v27h-79zM15861 0h79v27h-79zM16019 0h79v27h-79zM16178 0h79v27h-79zM16336 0h80v27h-80zM16495 0h79v27h-79zM16653 0h80v27h-80zM16812 0h79v27h-79zM16971 0h79v27h-79zM17129 0h80v27h-80zM17288 0h79v27h-79zM17446 0h80v27h-80zM17605 0h79v27h-79zM17764 0h79v27h-79zM17922 0h79l-26 27h-53z">
          <text:p/>
        </draw:path>
        <draw:polygon draw:style-name="gr3" draw:text-style-name="P3" draw:layer="layout" svg:width="18cm" svg:height="0.027cm" svg:x="1.499cm" svg:y="14.35cm" svg:viewBox="0 0 18001 28" draw:points="18001,28 0,28 0,0 18001,0">
          <text:p/>
        </draw:polygon>
        <draw:polygon draw:style-name="gr9" draw:text-style-name="P10" draw:layer="layout" svg:width="18cm" svg:height="2.699cm" svg:x="1.499cm" svg:y="16.539cm" svg:viewBox="0 0 18001 2700" draw:points="0,0 18001,0 18001,2700 0,2700">
          <text:p/>
        </draw:polygon>
        <draw:path draw:style-name="gr2" draw:text-style-name="P2" draw:layer="layout" svg:width="18cm" svg:height="2.699cm" svg:x="1.499cm" svg:y="16.539cm" svg:viewBox="0 0 18001 2700" svg:d="M27 26h17948v2647h-17948zM0 0h18001v2700h-18001z">
          <text:p/>
        </draw:path>
        <draw:polygon draw:style-name="gr10" draw:text-style-name="P11" draw:layer="layout" svg:width="18cm" svg:height="4.816cm" svg:x="1.499cm" svg:y="19.502cm" svg:viewBox="0 0 18001 4817" draw:points="0,0 18001,0 18001,4817 0,4817">
          <text:p/>
        </draw:polygon>
        <draw:path draw:style-name="gr11" draw:text-style-name="P12" draw:layer="layout" svg:width="18cm" svg:height="0.027cm" svg:x="1.499cm" svg:y="24.291cm" svg:viewBox="0 0 18001 28" svg:d="M80 0v28h-80l27-28zM159 0h79v28h-79zM318 0h79v28h-79zM476 0h80v28h-80zM635 0h79v28h-79zM793 0h80v28h-80zM952 0h79v28h-79zM1111 0h79v28h-79zM1269 0h80v28h-80zM1428 0h79v28h-79zM1586 0h80v28h-80zM1745 0h79v28h-79zM1904 0h79v28h-79zM2062 0h79v28h-79zM2221 0h79v28h-79zM2379 0h80v28h-80zM2538 0h79v28h-79zM2697 0h79v28h-79zM2855 0h79v28h-79zM3014 0h79v28h-79zM3172 0h80v28h-80zM3331 0h79v28h-79zM3489 0h80v28h-80zM3648 0h79v28h-79zM3807 0h79v28h-79zM3965 0h80v28h-80zM4124 0h79v28h-79zM4282 0h80v28h-80zM4441 0h79v28h-79zM4600 0h79v28h-79zM4758 0h80v28h-80zM4917 0h79v28h-79zM5075 0h80v28h-80zM5234 0h79v28h-79zM5393 0h79v28h-79zM5551 0h79v28h-79zM5710 0h79v28h-79zM5868 0h80v28h-80zM6027 0h79v28h-79zM6186 0h79v28h-79zM6344 0h79v28h-79zM6503 0h79v28h-79zM6661 0h80v28h-80zM6820 0h79v28h-79zM6978 0h80v28h-80zM7137 0h79v28h-79zM7296 0h79v28h-79zM7454 0h81v28h-81zM7614 0h79v28h-79zM7772 0h80v28h-80zM7931 0h79v28h-79zM8090 0h79v28h-79zM8248 0h79v28h-79zM8407 0h79v28h-79zM8565 0h80v28h-80zM8724 0h79v28h-79zM8883 0h79v28h-79zM9041 0h79v28h-79zM9200 0h79v28h-79zM9358 0h80v28h-80zM9517 0h79v28h-79zM9676 0h79v28h-79zM9834 0h79v28h-79zM9993 0h79v28h-79zM10151 0h80v28h-80zM10310 0h79v28h-79zM10468 0h80v28h-80zM10627 0h79v28h-79zM10786 0h79v28h-79zM10944 0h80v28h-80zM11103 0h79v28h-79zM11261 0h80v28h-80zM11420 0h79v28h-79zM11579 0h79v28h-79zM11737 0h79v28h-79zM11896 0h79v28h-79zM12054 0h80v28h-80zM12213 0h79v28h-79zM12372 0h79v28h-79zM12530 0h79v28h-79zM12689 0h79v28h-79zM12847 0h80v28h-80zM13006 0h79v28h-79zM13164 0h80v28h-80zM13323 0h79v28h-79zM13482 0h79v28h-79zM13640 0h80v28h-80zM13799 0h79v28h-79zM13957 0h80v28h-80zM14116 0h79v28h-79zM14275 0h79v28h-79zM14433 0h80v28h-80zM14592 0h79v28h-79zM14750 0h80v28h-80zM14909 0h79v28h-79zM15068 0h79v28h-79zM15226 0h79v28h-79zM15385 0h79v28h-79zM15543 0h80v28h-80zM15702 0h79v28h-79zM15861 0h79v28h-79zM16019 0h79v28h-79zM16178 0h79v28h-79zM16336 0h80v28h-80zM16495 0h79v28h-79zM16653 0h80v28h-80zM16812 0h79v28h-79zM16971 0h79v28h-79zM17129 0h80v28h-80zM17288 0h79v28h-79zM17446 0h80v28h-80zM17605 0h79v28h-79zM17764 0h79v28h-79zM17922 0h53l26 28h-79z">
          <text:p/>
        </draw:path>
        <draw:path draw:style-name="gr11" draw:text-style-name="P12" draw:layer="layout" svg:width="0.027cm" svg:height="4.816cm" svg:x="1.499cm" svg:y="19.502cm" svg:viewBox="0 0 28 4817" svg:d="M28 79h-28v-79l28 27zM0 158h28v79h-28zM0 316h28v79h-28zM0 474h28v79h-28zM0 632h28v79h-28zM0 790h28v78h-28zM0 947h28v79h-28zM0 1105h28v79h-28zM0 1263h28v79h-28zM0 1421h28v79h-28zM0 1579h28v79h-28zM0 1737h28v79h-28zM0 1895h28v79h-28zM0 2053h28v79h-28zM0 2211h28v79h-28zM0 2369h28v79h-28zM0 2527h28v79h-28zM0 2685h28v79h-28zM0 2843h28v79h-28zM0 3001h28v79h-28zM0 3159h28v79h-28zM0 3317h28v79h-28zM0 3475h28v78h-28zM0 3632h28v79h-28zM0 3790h28v79h-28zM0 3948h28v79h-28zM0 4106h28v79h-28zM0 4264h28v79h-28zM0 4422h28v79h-28zM0 4580h28v79h-28zM0 4738h28v52l-28 27z">
          <text:p/>
        </draw:path>
        <draw:path draw:style-name="gr11" draw:text-style-name="P12" draw:layer="layout" svg:width="0.026cm" svg:height="4.816cm" svg:x="19.473cm" svg:y="19.502cm" svg:viewBox="0 0 27 4817" svg:d="M27 79h-27v-52l27-27zM0 158h27v79h-27zM0 316h27v79h-27zM0 474h27v79h-27zM0 632h27v79h-27zM0 790h27v78h-27zM0 947h27v79h-27zM0 1105h27v79h-27zM0 1263h27v79h-27zM0 1421h27v79h-27zM0 1579h27v79h-27zM0 1737h27v79h-27zM0 1895h27v79h-27zM0 2053h27v79h-27zM0 2211h27v79h-27zM0 2369h27v79h-27zM0 2527h27v79h-27zM0 2685h27v79h-27zM0 2843h27v79h-27zM0 3001h27v79h-27zM0 3159h27v79h-27zM0 3317h27v79h-27zM0 3475h27v78h-27zM0 3632h27v79h-27zM0 3790h27v79h-27zM0 3948h27v79h-27zM0 4106h27v79h-27zM0 4264h27v79h-27zM0 4422h27v79h-27zM0 4580h27v79h-27zM0 4738h27v79l-27-27z">
          <text:p/>
        </draw:path>
        <draw:path draw:style-name="gr11" draw:text-style-name="P12" draw:layer="layout" svg:width="18cm" svg:height="0.027cm" svg:x="1.499cm" svg:y="19.502cm" svg:viewBox="0 0 18001 28" svg:d="M80 0v28h-53l-27-28zM159 0h79v28h-79zM318 0h79v28h-79zM476 0h80v28h-80zM635 0h79v28h-79zM793 0h80v28h-80zM952 0h79v28h-79zM1111 0h79v28h-79zM1269 0h80v28h-80zM1428 0h79v28h-79zM1586 0h80v28h-80zM1745 0h79v28h-79zM1904 0h79v28h-79zM2062 0h79v28h-79zM2221 0h79v28h-79zM2379 0h80v28h-80zM2538 0h79v28h-79zM2697 0h79v28h-79zM2855 0h79v28h-79zM3014 0h79v28h-79zM3172 0h80v28h-80zM3331 0h79v28h-79zM3489 0h80v28h-80zM3648 0h79v28h-79zM3807 0h79v28h-79zM3965 0h80v28h-80zM4124 0h79v28h-79zM4282 0h80v28h-80zM4441 0h79v28h-79zM4600 0h79v28h-79zM4758 0h80v28h-80zM4917 0h79v28h-79zM5075 0h80v28h-80zM5234 0h79v28h-79zM5393 0h79v28h-79zM5551 0h79v28h-79zM5710 0h79v28h-79zM5868 0h80v28h-80zM6027 0h79v28h-79zM6186 0h79v28h-79zM6344 0h79v28h-79zM6503 0h79v28h-79zM6661 0h80v28h-80zM6820 0h79v28h-79zM6978 0h80v28h-80zM7137 0h79v28h-79zM7296 0h79v28h-79zM7454 0h81v28h-81zM7614 0h79v28h-79zM7772 0h80v28h-80zM7931 0h79v28h-79zM8090 0h79v28h-79zM8248 0h79v28h-79zM8407 0h79v28h-79zM8565 0h80v28h-80zM8724 0h79v28h-79zM8883 0h79v28h-79zM9041 0h79v28h-79zM9200 0h79v28h-79zM9358 0h80v28h-80zM9517 0h79v28h-79zM9676 0h79v28h-79zM9834 0h79v28h-79zM9993 0h79v28h-79zM10151 0h80v28h-80zM10310 0h79v28h-79zM10468 0h80v28h-80zM10627 0h79v28h-79zM10786 0h79v28h-79zM10944 0h80v28h-80zM11103 0h79v28h-79zM11261 0h80v28h-80zM11420 0h79v28h-79zM11579 0h79v28h-79zM11737 0h79v28h-79zM11896 0h79v28h-79zM12054 0h80v28h-80zM12213 0h79v28h-79zM12372 0h79v28h-79zM12530 0h79v28h-79zM12689 0h79v28h-79zM12847 0h80v28h-80zM13006 0h79v28h-79zM13164 0h80v28h-80zM13323 0h79v28h-79zM13482 0h79v28h-79zM13640 0h80v28h-80zM13799 0h79v28h-79zM13957 0h80v28h-80zM14116 0h79v28h-79zM14275 0h79v28h-79zM14433 0h80v28h-80zM14592 0h79v28h-79zM14750 0h80v28h-80zM14909 0h79v28h-79zM15068 0h79v28h-79zM15226 0h79v28h-79zM15385 0h79v28h-79zM15543 0h80v28h-80zM15702 0h79v28h-79zM15861 0h79v28h-79zM16019 0h79v28h-79zM16178 0h79v28h-79zM16336 0h80v28h-80zM16495 0h79v28h-79zM16653 0h80v28h-80zM16812 0h79v28h-79zM16971 0h79v28h-79zM17129 0h80v28h-80zM17288 0h79v28h-79zM17446 0h80v28h-80zM17605 0h79v28h-79zM17764 0h79v28h-79zM17922 0h79l-26 28h-53z">
          <text:p/>
        </draw:path>
        <draw:polygon draw:style-name="gr3" draw:text-style-name="P3" draw:layer="layout" svg:width="18cm" svg:height="0.026cm" svg:x="1.499cm" svg:y="25.826cm" svg:viewBox="0 0 18001 27" draw:points="18001,27 0,27 0,0 18001,0">
          <text:p/>
        </draw:polygon>
        <draw:frame draw:style-name="gr7" draw:text-style-name="P8" draw:layer="layout" svg:width="6.945cm" svg:height="0.628cm" svg:x="1.5cm" svg:y="1.611cm">
          <draw:text-box>
            <text:p text:style-name="P4"><text:span text:style-name="T4">3. Database Structure (DDL)</text:span></text:p>
          </draw:text-box>
        </draw:frame>
        <draw:frame draw:style-name="gr5" draw:text-style-name="P6" draw:layer="layout" svg:width="16.154cm" svg:height="0.471cm" svg:x="1.5cm" svg:y="2.925cm">
          <draw:text-box>
            <text:p text:style-name="P4"><text:span text:style-name="T2">The database structure was implemented using SQL Data Definition Language (DDL) to create</text:span></text:p>
          </draw:text-box>
        </draw:frame>
        <draw:frame draw:style-name="gr5" draw:text-style-name="P6" draw:layer="layout" svg:width="11.546cm" svg:height="0.471cm" svg:x="1.5cm" svg:y="3.56cm">
          <draw:text-box>
            <text:p text:style-name="P4"><text:span text:style-name="T2">normalized tables with appropriate indexing and relational integrity.</text:span></text:p>
          </draw:text-box>
        </draw:frame>
        <draw:frame draw:style-name="gr12" draw:text-style-name="P13" draw:layer="layout" svg:width="8.014cm" svg:height="0.399cm" svg:x="1.791cm" svg:y="5.42cm">
          <draw:text-box>
            <text:p text:style-name="P4"><text:span text:style-name="T5">mysql&gt; CREATE DATABASE OnlineShopping;</text:span></text:p>
          </draw:text-box>
        </draw:frame>
        <draw:frame draw:style-name="gr12" draw:text-style-name="P13" draw:layer="layout" svg:width="5.484cm" svg:height="0.399cm" svg:x="1.791cm" svg:y="5.949cm">
          <draw:text-box>
            <text:p text:style-name="P4"><text:span text:style-name="T5">mysql&gt; USE OnlineShopping;</text:span></text:p>
          </draw:text-box>
        </draw:frame>
        <draw:frame draw:style-name="gr12" draw:text-style-name="P13" draw:layer="layout" svg:width="4.008cm" svg:height="0.399cm" svg:x="1.791cm" svg:y="6.478cm">
          <draw:text-box>
            <text:p text:style-name="P4"><text:span text:style-name="T5">mysql&gt; SHOW TABLES;</text:span></text:p>
          </draw:text-box>
        </draw:frame>
        <draw:frame draw:style-name="gr7" draw:text-style-name="P8" draw:layer="layout" svg:width="10.183cm" svg:height="0.628cm" svg:x="1.5cm" svg:y="13.615cm">
          <draw:text-box>
            <text:p text:style-name="P4"><text:span text:style-name="T4">4. Security: Data Hashing Implementation</text:span></text:p>
          </draw:text-box>
        </draw:frame>
        <draw:frame draw:style-name="gr5" draw:text-style-name="P6" draw:layer="layout" svg:width="17.003cm" svg:height="0.471cm" svg:x="1.5cm" svg:y="14.929cm">
          <draw:text-box>
            <text:p text:style-name="P4"><text:span text:style-name="T2">I utilized the SHA2 algorithm to encrypt sensitive user passwords. This conversion to a 256-bit hash</text:span></text:p>
          </draw:text-box>
        </draw:frame>
        <draw:frame draw:style-name="gr5" draw:text-style-name="P6" draw:layer="layout" svg:width="11.288cm" svg:height="0.471cm" svg:x="1.5cm" svg:y="15.564cm">
          <draw:text-box>
            <text:p text:style-name="P4"><text:span text:style-name="T2">ensures that the original text is never visible in the database tables.</text:span></text:p>
          </draw:text-box>
        </draw:frame>
        <draw:frame draw:style-name="gr12" draw:text-style-name="P13" draw:layer="layout" svg:width="14.34cm" svg:height="0.399cm" svg:x="1.791cm" svg:y="17.424cm">
          <draw:text-box>
            <text:p text:style-name="P4"><text:span text:style-name="T5">mysql&gt; UPDATE customers SET Password = SHA2('UserPassword123', 256);</text:span></text:p>
          </draw:text-box>
        </draw:frame>
        <draw:frame draw:style-name="gr12" draw:text-style-name="P13" draw:layer="layout" svg:width="9.28cm" svg:height="0.399cm" svg:x="1.791cm" svg:y="17.953cm">
          <draw:text-box>
            <text:p text:style-name="P4"><text:span text:style-name="T5">mysql&gt; SELECT Name, Password FROM customers;</text:span></text:p>
          </draw:text-box>
        </draw:frame>
        <draw:frame draw:style-name="gr7" draw:text-style-name="P8" draw:layer="layout" svg:width="8.306cm" svg:height="0.628cm" svg:x="1.5cm" svg:y="25.09cm">
          <draw:text-box>
            <text:p text:style-name="P4"><text:span text:style-name="T4">5. Access Control &amp; Authorization</text:span></text:p>
          </draw:text-box>
        </draw:frame>
        <draw:frame draw:style-name="gr5" draw:text-style-name="P6" draw:layer="layout" svg:width="17.282cm" svg:height="0.471cm" svg:x="1.5cm" svg:y="26.404cm">
          <draw:text-box>
            <text:p text:style-name="P4"><text:span text:style-name="T2">I configured role-based security by creating specific users and applying the principle of least privilege</text:span></text:p>
          </draw:text-box>
        </draw:frame>
        <draw:frame draw:style-name="gr5" draw:text-style-name="P6" draw:layer="layout" svg:width="7.069cm" svg:height="0.471cm" svg:x="1.5cm" svg:y="27.039cm">
          <draw:text-box>
            <text:p text:style-name="P4"><text:span text:style-name="T2">using GRANT and REVOKE commands.</text:span></text:p>
          </draw:text-box>
        </draw:frame>
        <draw:frame draw:style-name="gr8" draw:text-style-name="P9" draw:layer="layout" svg:width="6.35cm" svg:height="5.715cm" svg:x="10.795cm" svg:y="7.62cm">
          <draw:image xlink:href="Pictures/100000010000011D0000013D7BF4BE8A.png" xlink:type="simple" xlink:show="embed" xlink:actuate="onLoad" draw:mime-type="image/png">
            <text:p/>
          </draw:image>
        </draw:frame>
        <draw:frame draw:style-name="gr8" draw:text-style-name="P9" draw:layer="layout" svg:width="20.319cm" svg:height="5.34cm" svg:x="0.001cm" svg:y="19.107cm">
          <draw:image xlink:href="Pictures/100000010000035D000000DBAB76119A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20.999cm" svg:height="29.699cm" svg:x="0cm" svg:y="0cm" svg:viewBox="0 0 21000 29700" draw:points="0,0 21000,0 21000,29700 0,29700">
          <text:p/>
        </draw:polygon>
        <draw:polygon draw:style-name="gr9" draw:text-style-name="P10" draw:layer="layout" svg:width="18cm" svg:height="3.228cm" svg:x="1.499cm" svg:y="1.499cm" svg:viewBox="0 0 18001 3229" draw:points="0,0 18001,0 18001,3229 0,3229">
          <text:p/>
        </draw:polygon>
        <draw:path draw:style-name="gr2" draw:text-style-name="P2" draw:layer="layout" svg:width="18cm" svg:height="3.228cm" svg:x="1.499cm" svg:y="1.499cm" svg:viewBox="0 0 18001 3229" svg:d="M27 27h17948v3176h-17948zM0 0h18001v3229h-18001z">
          <text:p/>
        </draw:path>
        <draw:polygon draw:style-name="gr3" draw:text-style-name="P3" draw:layer="layout" svg:width="18cm" svg:height="0.026cm" svg:x="1.499cm" svg:y="6.236cm" svg:viewBox="0 0 18001 27" draw:points="18001,27 0,27 0,0 18001,0">
          <text:p/>
        </draw:polygon>
        <draw:polygon draw:style-name="gr9" draw:text-style-name="P10" draw:layer="layout" svg:width="18cm" svg:height="3.228cm" svg:x="1.684cm" svg:y="9.471cm" svg:viewBox="0 0 18001 3229" draw:points="0,0 18001,0 18001,3229 0,3229">
          <text:p/>
        </draw:polygon>
        <draw:path draw:style-name="gr2" draw:text-style-name="P2" draw:layer="layout" svg:width="18cm" svg:height="3.228cm" svg:x="1.499cm" svg:y="8.424cm" svg:viewBox="0 0 18001 3229" svg:d="M27 26h17948v3176h-17948zM0 0h18001v3229h-18001z">
          <text:p/>
        </draw:path>
        <draw:polygon draw:style-name="gr10" draw:text-style-name="P11" draw:layer="layout" svg:width="18cm" svg:height="4.816cm" svg:x="1.499cm" svg:y="11.916cm" svg:viewBox="0 0 18001 4817" draw:points="0,0 18001,0 18001,4817 0,4817">
          <text:p/>
        </draw:polygon>
        <draw:path draw:style-name="gr11" draw:text-style-name="P12" draw:layer="layout" svg:width="18cm" svg:height="0.027cm" svg:x="1.499cm" svg:y="16.705cm" svg:viewBox="0 0 18001 28" svg:d="M80 0v28h-80l27-28zM159 0h79v28h-79zM318 0h79v28h-79zM476 0h80v28h-80zM635 0h79v28h-79zM793 0h80v28h-80zM952 0h79v28h-79zM1111 0h79v28h-79zM1269 0h80v28h-80zM1428 0h79v28h-79zM1586 0h80v28h-80zM1745 0h79v28h-79zM1904 0h79v28h-79zM2062 0h79v28h-79zM2221 0h79v28h-79zM2379 0h80v28h-80zM2538 0h79v28h-79zM2697 0h79v28h-79zM2855 0h79v28h-79zM3014 0h79v28h-79zM3172 0h80v28h-80zM3331 0h79v28h-79zM3489 0h80v28h-80zM3648 0h79v28h-79zM3807 0h79v28h-79zM3965 0h80v28h-80zM4124 0h79v28h-79zM4282 0h80v28h-80zM4441 0h79v28h-79zM4600 0h79v28h-79zM4758 0h80v28h-80zM4917 0h79v28h-79zM5075 0h80v28h-80zM5234 0h79v28h-79zM5393 0h79v28h-79zM5551 0h79v28h-79zM5710 0h79v28h-79zM5868 0h80v28h-80zM6027 0h79v28h-79zM6186 0h79v28h-79zM6344 0h79v28h-79zM6503 0h79v28h-79zM6661 0h80v28h-80zM6820 0h79v28h-79zM6978 0h80v28h-80zM7137 0h79v28h-79zM7296 0h79v28h-79zM7454 0h81v28h-81zM7614 0h79v28h-79zM7772 0h80v28h-80zM7931 0h79v28h-79zM8090 0h79v28h-79zM8248 0h79v28h-79zM8407 0h79v28h-79zM8565 0h80v28h-80zM8724 0h79v28h-79zM8883 0h79v28h-79zM9041 0h79v28h-79zM9200 0h79v28h-79zM9358 0h80v28h-80zM9517 0h79v28h-79zM9676 0h79v28h-79zM9834 0h79v28h-79zM9993 0h79v28h-79zM10151 0h80v28h-80zM10310 0h79v28h-79zM10468 0h80v28h-80zM10627 0h79v28h-79zM10786 0h79v28h-79zM10944 0h80v28h-80zM11103 0h79v28h-79zM11261 0h80v28h-80zM11420 0h79v28h-79zM11579 0h79v28h-79zM11737 0h79v28h-79zM11896 0h79v28h-79zM12054 0h80v28h-80zM12213 0h79v28h-79zM12372 0h79v28h-79zM12530 0h79v28h-79zM12689 0h79v28h-79zM12847 0h80v28h-80zM13006 0h79v28h-79zM13164 0h80v28h-80zM13323 0h79v28h-79zM13482 0h79v28h-79zM13640 0h80v28h-80zM13799 0h79v28h-79zM13957 0h80v28h-80zM14116 0h79v28h-79zM14275 0h79v28h-79zM14433 0h80v28h-80zM14592 0h79v28h-79zM14750 0h80v28h-80zM14909 0h79v28h-79zM15068 0h79v28h-79zM15226 0h79v28h-79zM15385 0h79v28h-79zM15543 0h80v28h-80zM15702 0h79v28h-79zM15861 0h79v28h-79zM16019 0h79v28h-79zM16178 0h79v28h-79zM16336 0h80v28h-80zM16495 0h79v28h-79zM16653 0h80v28h-80zM16812 0h79v28h-79zM16971 0h79v28h-79zM17129 0h80v28h-80zM17288 0h79v28h-79zM17446 0h80v28h-80zM17605 0h79v28h-79zM17764 0h79v28h-79zM17922 0h53l26 28h-79z">
          <text:p/>
        </draw:path>
        <draw:path draw:style-name="gr11" draw:text-style-name="P12" draw:layer="layout" svg:width="0.027cm" svg:height="4.816cm" svg:x="1.499cm" svg:y="11.916cm" svg:viewBox="0 0 28 4817" svg:d="M28 79h-28v-79l28 27zM0 159h28v79h-28zM0 317h28v79h-28zM0 475h28v79h-28zM0 633h28v79h-28zM0 791h28v79h-28zM0 949h28v79h-28zM0 1106h28v79h-28zM0 1264h28v79h-28zM0 1422h28v79h-28zM0 1580h28v79h-28zM0 1738h28v79h-28zM0 1896h28v79h-28zM0 2054h28v79h-28zM0 2212h28v79h-28zM0 2370h28v79h-28zM0 2527h28v79h-28zM0 2685h28v79h-28zM0 2843h28v79h-28zM0 3001h28v79h-28zM0 3159h28v79h-28zM0 3317h28v79h-28zM0 3475h28v79h-28zM0 3633h28v79h-28zM0 3791h28v78h-28zM0 3948h28v79h-28zM0 4106h28v79h-28zM0 4264h28v79h-28zM0 4422h28v79h-28zM0 4580h28v79h-28zM0 4738h28v52l-28 27z">
          <text:p/>
        </draw:path>
        <draw:path draw:style-name="gr11" draw:text-style-name="P12" draw:layer="layout" svg:width="0.026cm" svg:height="4.816cm" svg:x="19.473cm" svg:y="11.916cm" svg:viewBox="0 0 27 4817" svg:d="M27 79h-27v-52l27-27zM0 159h27v79h-27zM0 317h27v79h-27zM0 475h27v79h-27zM0 633h27v79h-27zM0 791h27v79h-27zM0 949h27v79h-27zM0 1106h27v79h-27zM0 1264h27v79h-27zM0 1422h27v79h-27zM0 1580h27v79h-27zM0 1738h27v79h-27zM0 1896h27v79h-27zM0 2054h27v79h-27zM0 2212h27v79h-27zM0 2370h27v79h-27zM0 2527h27v79h-27zM0 2685h27v79h-27zM0 2843h27v79h-27zM0 3001h27v79h-27zM0 3159h27v79h-27zM0 3317h27v79h-27zM0 3475h27v79h-27zM0 3633h27v79h-27zM0 3791h27v78h-27zM0 3948h27v79h-27zM0 4106h27v79h-27zM0 4264h27v79h-27zM0 4422h27v79h-27zM0 4580h27v79h-27zM0 4738h27v79l-27-27z">
          <text:p/>
        </draw:path>
        <draw:path draw:style-name="gr11" draw:text-style-name="P12" draw:layer="layout" svg:width="18cm" svg:height="0.027cm" svg:x="1.499cm" svg:y="11.916cm" svg:viewBox="0 0 18001 28" svg:d="M80 0v28h-53l-27-28zM159 0h79v28h-79zM318 0h79v28h-79zM476 0h80v28h-80zM635 0h79v28h-79zM793 0h80v28h-80zM952 0h79v28h-79zM1111 0h79v28h-79zM1269 0h80v28h-80zM1428 0h79v28h-79zM1586 0h80v28h-80zM1745 0h79v28h-79zM1904 0h79v28h-79zM2062 0h79v28h-79zM2221 0h79v28h-79zM2379 0h80v28h-80zM2538 0h79v28h-79zM2697 0h79v28h-79zM2855 0h79v28h-79zM3014 0h79v28h-79zM3172 0h80v28h-80zM3331 0h79v28h-79zM3489 0h80v28h-80zM3648 0h79v28h-79zM3807 0h79v28h-79zM3965 0h80v28h-80zM4124 0h79v28h-79zM4282 0h80v28h-80zM4441 0h79v28h-79zM4600 0h79v28h-79zM4758 0h80v28h-80zM4917 0h79v28h-79zM5075 0h80v28h-80zM5234 0h79v28h-79zM5393 0h79v28h-79zM5551 0h79v28h-79zM5710 0h79v28h-79zM5868 0h80v28h-80zM6027 0h79v28h-79zM6186 0h79v28h-79zM6344 0h79v28h-79zM6503 0h79v28h-79zM6661 0h80v28h-80zM6820 0h79v28h-79zM6978 0h80v28h-80zM7137 0h79v28h-79zM7296 0h79v28h-79zM7454 0h81v28h-81zM7614 0h79v28h-79zM7772 0h80v28h-80zM7931 0h79v28h-79zM8090 0h79v28h-79zM8248 0h79v28h-79zM8407 0h79v28h-79zM8565 0h80v28h-80zM8724 0h79v28h-79zM8883 0h79v28h-79zM9041 0h79v28h-79zM9200 0h79v28h-79zM9358 0h80v28h-80zM9517 0h79v28h-79zM9676 0h79v28h-79zM9834 0h79v28h-79zM9993 0h79v28h-79zM10151 0h80v28h-80zM10310 0h79v28h-79zM10468 0h80v28h-80zM10627 0h79v28h-79zM10786 0h79v28h-79zM10944 0h80v28h-80zM11103 0h79v28h-79zM11261 0h80v28h-80zM11420 0h79v28h-79zM11579 0h79v28h-79zM11737 0h79v28h-79zM11896 0h79v28h-79zM12054 0h80v28h-80zM12213 0h79v28h-79zM12372 0h79v28h-79zM12530 0h79v28h-79zM12689 0h79v28h-79zM12847 0h80v28h-80zM13006 0h79v28h-79zM13164 0h80v28h-80zM13323 0h79v28h-79zM13482 0h79v28h-79zM13640 0h80v28h-80zM13799 0h79v28h-79zM13957 0h80v28h-80zM14116 0h79v28h-79zM14275 0h79v28h-79zM14433 0h80v28h-80zM14592 0h79v28h-79zM14750 0h80v28h-80zM14909 0h79v28h-79zM15068 0h79v28h-79zM15226 0h79v28h-79zM15385 0h79v28h-79zM15543 0h80v28h-80zM15702 0h79v28h-79zM15861 0h79v28h-79zM16019 0h79v28h-79zM16178 0h79v28h-79zM16336 0h80v28h-80zM16495 0h79v28h-79zM16653 0h80v28h-80zM16812 0h79v28h-79zM16971 0h79v28h-79zM17129 0h80v28h-80zM17288 0h79v28h-79zM17446 0h80v28h-80zM17605 0h79v28h-79zM17764 0h79v28h-79zM17922 0h79l-26 28h-53z">
          <text:p/>
        </draw:path>
        <draw:frame draw:style-name="gr12" draw:text-style-name="P13" draw:layer="layout" svg:width="13.286cm" svg:height="0.399cm" svg:x="1.791cm" svg:y="2.385cm">
          <draw:text-box>
            <text:p text:style-name="P4"><text:span text:style-name="T5">mysql&gt; CREATE USER 'user'@'localhost' IDENTIFIED BY 'password';</text:span></text:p>
          </draw:text-box>
        </draw:frame>
        <draw:frame draw:style-name="gr12" draw:text-style-name="P13" draw:layer="layout" svg:width="14.762cm" svg:height="0.399cm" svg:x="1.791cm" svg:y="2.914cm">
          <draw:text-box>
            <text:p text:style-name="P4"><text:span text:style-name="T5">mysql&gt; GRANT SELECT, INSERT ON OnlineShopping.* TO 'user'@'localhost';</text:span></text:p>
          </draw:text-box>
        </draw:frame>
        <draw:frame draw:style-name="gr12" draw:text-style-name="P13" draw:layer="layout" svg:width="13.708cm" svg:height="0.399cm" svg:x="1.791cm" svg:y="3.443cm">
          <draw:text-box>
            <text:p text:style-name="P4"><text:span text:style-name="T5">mysql&gt; REVOKE DELETE ON OnlineShopping.* FROM 'user'@'localhost';</text:span></text:p>
          </draw:text-box>
        </draw:frame>
        <draw:frame draw:style-name="gr7" draw:text-style-name="P8" draw:layer="layout" svg:width="6.414cm" svg:height="0.628cm" svg:x="1.5cm" svg:y="5.5cm">
          <draw:text-box>
            <text:p text:style-name="P4"><text:span text:style-name="T4">6. Verification and Testing</text:span></text:p>
          </draw:text-box>
        </draw:frame>
        <draw:frame draw:style-name="gr5" draw:text-style-name="P6" draw:layer="layout" svg:width="17.412cm" svg:height="0.471cm" svg:x="1.5cm" svg:y="6.814cm">
          <draw:text-box>
            <text:p text:style-name="P4"><text:span text:style-name="T2">The security model was verified by logging in as the restricted user and attempting a prohibited action.</text:span></text:p>
          </draw:text-box>
        </draw:frame>
        <draw:frame draw:style-name="gr13" draw:text-style-name="P14" draw:layer="layout" svg:width="19.894cm" svg:height="2.046cm" svg:x="0.952cm" svg:y="7.479cm">
          <draw:text-box>
            <text:p text:style-name="P4"><text:span text:style-name="T2">The system successfully blocked the operation with an Error .</text:span></text:p>
            <text:p text:style-name="P4"><text:span text:style-name="T2">Here I tested this using the mysql workbench. Below is the screenshot of what happens if the customer tries to delete </text:span></text:p>
            <text:p text:style-name="P4"><text:span text:style-name="T2">Some data in the database</text:span></text:p>
          </draw:text-box>
        </draw:frame>
        <draw:frame draw:style-name="gr12" draw:text-style-name="P13" draw:layer="layout" svg:width="12.442cm" svg:height="0.399cm" svg:x="1.791cm" svg:y="9.838cm">
          <draw:text-box>
            <text:p text:style-name="P4"><text:span text:style-name="T5"><text:s/>DELETE FROM OnlineShopping.customers WHERE CustomerID = 1;</text:span></text:p>
          </draw:text-box>
        </draw:frame>
        <draw:frame draw:style-name="gr12" draw:text-style-name="P13" draw:layer="layout" svg:width="13.075cm" svg:height="0.399cm" svg:x="1.791cm" svg:y="10.367cm">
          <draw:text-box>
            <text:p text:style-name="P4"><text:span text:style-name="T5">ERROR 1142 : DELETE command denied to user 'user'@'localhost';</text:span></text:p>
          </draw:text-box>
        </draw:frame>
        <draw:frame draw:style-name="gr12" draw:text-style-name="P13" draw:layer="layout" svg:width="5.233cm" svg:height="0.39cm" svg:x="7.935cm" svg:y="17.86cm">
          <draw:text-box>
            <text:p text:style-name="P4"><text:span text:style-name="T6">--- END OF PROJECT REPORT --- </text:span></text:p>
          </draw:text-box>
        </draw:frame>
        <draw:frame draw:style-name="gr8" draw:text-style-name="P9" draw:layer="layout" svg:width="20.999cm" svg:height="7.608cm" svg:x="-0.362cm" svg:y="12.065cm">
          <draw:image xlink:href="Pictures/1000000100000556000001EFB6057D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-Mono" svg:font-family="Liberation-Mono"/>
    <style:font-face style:name="Liberation-Serif" svg:font-family="Liberation-Serif"/>
    <style:font-face style:name="LiberationSerif" svg:font-family="LiberationSerif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5-06T18:19:51.781278900</dc:date>
    <meta:editing-duration>PT12M21S</meta:editing-duration>
    <meta:editing-cycles>4</meta:editing-cycles>
    <meta:generator>LibreOffice/26.2.1.2$Windows_X86_64 LibreOffice_project/620$Build-2</meta:generator>
    <meta:document-statistic meta:object-count="76"/>
  </office:meta>
</office:document-meta>
</file>